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padding="0in" fo:border="none" style:writing-mode="lr-tb"/>
    </style:style>
    <style:style style:name="P2" style:family="paragraph" style:parent-style-name="Standard">
      <style:paragraph-properties fo:margin-left="0in" fo:margin-right="0in" fo:margin-top="0.1252in" fo:margin-bottom="0.1665in" fo:text-indent="0in" style:auto-text-indent="false" fo:padding="0in" fo:border="none"/>
      <style:text-properties style:text-line-through-style="none" style:font-name="Google Sans" fo:font-size="12pt" style:text-underline-style="none" fo:font-weight="normal" style:text-blinking="false"/>
    </style:style>
    <style:style style:name="P3" style:family="paragraph" style:parent-style-name="Standard">
      <style:paragraph-properties fo:margin-left="0in" fo:margin-right="0in" fo:margin-top="0.25in" fo:margin-bottom="0.1252in" fo:text-indent="0in" style:auto-text-indent="false" fo:padding="0in" fo:border="none"/>
      <style:text-properties style:text-line-through-style="none" style:font-name="Google Sans" fo:font-size="15pt" style:text-underline-style="none" fo:font-weight="bold" style:text-blinking="false"/>
    </style:style>
    <style:style style:name="P4" style:family="paragraph" style:parent-style-name="Standard">
      <style:paragraph-properties fo:margin-left="0in" fo:margin-right="0in" fo:margin-top="0.25in" fo:margin-bottom="0.1252in" fo:text-indent="0in" style:auto-text-indent="false" fo:padding="0in" fo:border="none"/>
      <style:text-properties style:text-line-through-style="none" style:font-name="Google Sans" fo:font-size="12pt" style:text-underline-style="none" fo:font-weight="bold" style:text-blinking="false"/>
    </style:style>
    <style:style style:name="P5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in" fo:margin-top="0in" fo:margin-bottom="0in" fo:text-indent="0in" style:auto-text-indent="false" fo:padding="0in" fo:border="none"/>
    </style:style>
    <style:style style:name="P10" style:family="paragraph" style:parent-style-name="Text_20_body" style:list-style-name="L5">
      <style:paragraph-properties fo:margin-left="0in" fo:margin-right="0in" fo:margin-top="0in" fo:margin-bottom="0in" fo:text-indent="0in" style:auto-text-indent="false" fo:padding="0in" fo:border="none" style:writing-mode="lr-tb"/>
    </style:style>
    <style:style style:name="P11" style:family="paragraph" style:parent-style-name="Text_20_body" style:list-style-name="L3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008in solid #2c2e35" style:writing-mode="lr-tb"/>
    </style:style>
    <style:style style:name="P12" style:family="paragraph" style:parent-style-name="Text_20_body">
      <style:paragraph-properties fo:margin-left="0in" fo:margin-right="0in" fo:margin-top="0.1252in" fo:margin-bottom="0.1665in" fo:text-indent="0in" style:auto-text-indent="false" fo:padding="0in" fo:border="none"/>
      <style:text-properties style:text-line-through-style="none" style:font-name="Google Sans" fo:font-size="12pt" style:text-underline-style="none" fo:font-weight="normal" style:text-blinking="false"/>
    </style:style>
    <style:style style:name="P13" style:family="paragraph" style:parent-style-name="Text_20_body">
      <style:paragraph-properties fo:margin-left="0in" fo:margin-right="0in" fo:margin-top="0.25in" fo:margin-bottom="0.1252in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.25in" fo:margin-bottom="0.1252in" fo:text-indent="0in" style:auto-text-indent="false" fo:padding="0in" fo:border="none"/>
      <style:text-properties style:text-line-through-style="none" style:font-name="Google Sans" fo:font-size="12pt" style:text-underline-style="none" fo:font-weight="bold" style:text-blinking="false"/>
    </style:style>
    <style:style style:name="P15" style:family="paragraph" style:parent-style-name="Text_20_body">
      <style:paragraph-properties fo:margin-left="0in" fo:margin-right="0in" fo:text-indent="0in" style:auto-text-indent="false" fo:padding="0in" fo:border="none"/>
      <style:text-properties style:text-line-through-style="none" style:font-name="Google Sans" fo:font-size="12pt" style:text-underline-style="none" fo:font-weight="normal" style:text-blinking="false"/>
    </style:style>
    <style:style style:name="T1" style:family="text">
      <style:text-properties style:text-line-through-style="none" style:font-name="Google Sans" fo:font-size="12pt" style:text-underline-style="none" fo:font-weight="normal" style:text-blinking="false"/>
    </style:style>
    <style:style style:name="T2" style:family="text">
      <style:text-properties style:text-line-through-style="none" style:font-name="Google Sans" fo:font-size="12pt" style:text-underline-style="none" fo:font-weight="bold" style:text-blinking="false"/>
    </style:style>
    <style:style style:name="T3" style:family="text">
      <style:text-properties style:text-line-through-style="none" style:font-name="monospace" fo:font-size="10.5pt" style:text-underline-style="none" fo:font-weight="normal" style:text-blinking="false"/>
    </style:style>
    <style:style style:name="T4" style:family="text">
      <style:text-properties style:text-line-through-style="none" style:font-name="monospace" fo:font-size="10.5pt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</text:span><text:span text:style-name="Source_20_Text"><text:span text:style-name="T3">Exception in thread "serial-input" java.lang.NullPointerException</text:span></text:span><text:span text:style-name="T1"> error occurs because </text:span><text:span text:style-name="Strong_20_Emphasis"><text:span text:style-name="T2">the Intel Galileo Flash Tool (or Arduino IDE) lost communication with the board's serial port during a firmware flash update.</text:span></text:span></text:p>
      <text:p text:style-name="P2">This Java exception means the software tried to read from or write to a COM/Serial port object that was suddenly disconnected, uninitialized, or blocked by the operating system.</text:p>
      <text:p text:style-name="P3">Quick Fix Steps</text:p>
      <text:p text:style-name="P4">1. Correct the Power and USB Cable Sequence</text:p>
      <text:p text:style-name="P2">The Intel Galileo requires external power to stabilize its serial communication. Interrupted sequences trigger null pointers.</text:p>
      <text:list xml:id="list8533608581007051621" text:style-name="L1">
        <text:list-item>
          <text:p text:style-name="P5"><text:span text:style-name="Strong_20_Emphasis"><text:span text:style-name="T2">Disconnect everything</text:span></text:span><text:span text:style-name="T1"> (both the USB cable and power adapter).</text:span></text:p>
        </text:list-item>
        <text:list-item>
          <text:p text:style-name="P5"><text:span text:style-name="Strong_20_Emphasis"><text:span text:style-name="T2">Plug in the 5V power supply first.</text:span></text:span><text:span text:style-name="T1"> Always power the board before connecting it to your PC.</text:span></text:p>
        </text:list-item>
        <text:list-item>
          <text:p text:style-name="P5"><text:span text:style-name="Strong_20_Emphasis"><text:span text:style-name="T2">Wait 10–15 seconds</text:span></text:span><text:span text:style-name="T1"> for the onboard Linux operating system to fully boot up.</text:span></text:p>
        </text:list-item>
        <text:list-item>
          <text:p text:style-name="P5"><text:span text:style-name="Strong_20_Emphasis"><text:span text:style-name="T2">Plug in the Micro-USB cable</text:span></text:span><text:span text:style-name="T1"> to the USB Client port (nearest the Ethernet jack), not the USB Host port. [</text:span><text:a xlink:type="simple" xlink:href="https://forum.arduino.cc/t/unprogrammable-intel-galileo/399040" text:style-name="Internet_20_link" text:visited-style-name="Visited_20_Internet_20_Link">1</text:a><text:span text:style-name="T1">, </text:span><text:a xlink:type="simple" xlink:href="https://blog.arduino.cc/2013/12/06/a-step-by-step-tutorial-for-intel-galileo/" text:style-name="Internet_20_link" text:visited-style-name="Visited_20_Internet_20_Link">2</text:a><text:span text:style-name="T1">, </text:span><text:a xlink:type="simple" xlink:href="https://docs.arduino.cc/retired/getting-started-guides/IntelGalileoGen2/" text:style-name="Internet_20_link" text:visited-style-name="Visited_20_Internet_20_Link">3</text:a><text:span text:style-name="T1">, </text:span><text:a xlink:type="simple" xlink:href="https://www.open-electronics.org/an-intel-galileo-walkthrough/" text:style-name="Internet_20_link" text:visited-style-name="Visited_20_Internet_20_Link">4</text:a><text:span text:style-name="T1">]</text:span></text:p>
        </text:list-item>
      </text:list>
      <text:p text:style-name="P13"><text:span text:style-name="T2">2. Install the Proper 32-bit Java Runtime (JRE) [</text:span><text:a xlink:type="simple" xlink:href="https://digitalgraphy.wordpress.com/2015/06/23/fixing-the-driver-issues-with-intel-galileo-gen-2/" text:style-name="Internet_20_link" text:visited-style-name="Visited_20_Internet_20_Link">1</text:a><text:span text:style-name="T2">]</text:span></text:p>
      <text:p text:style-name="P15">The legacy Intel Galileo Firmware Updater relies on 32-bit serial drivers that crash on modern 64-bit Java environments.</text:p>
      <text:list xml:id="list4417523522348284820" text:style-name="L2">
        <text:list-item>
          <text:p text:style-name="P6"><text:span text:style-name="T1">Download and install a </text:span><text:span text:style-name="Strong_20_Emphasis"><text:span text:style-name="T2">32-bit (x86) version of the Java Development Kit (JDK) or JRE</text:span></text:span><text:span text:style-name="T1"> (Java 8 is highly recommended for compatibility). [</text:span><text:a xlink:type="simple" xlink:href="https://digitalgraphy.wordpress.com/2015/06/23/fixing-the-driver-issues-with-intel-galileo-gen-2/" text:style-name="Internet_20_link" text:visited-style-name="Visited_20_Internet_20_Link">1</text:a><text:span text:style-name="T1">]</text:span></text:p>
        </text:list-item>
      </text:list>
      <text:p text:style-name="P14">3. Update or Re-assign the COM Port Drivers</text:p>
      <text:p text:style-name="P12">Windows often fails to recognize or drops the Galileo driver during a flash, leaving the serial reference null.</text:p>
      <text:list xml:id="list1982860141200441555" text:style-name="L3">
        <text:list-item>
          <text:p text:style-name="P7"><text:span text:style-name="T1">Open </text:span><text:span text:style-name="Strong_20_Emphasis"><text:span text:style-name="T2">Device Manager</text:span></text:span><text:span text:style-name="T1"> on your computer.</text:span></text:p>
        </text:list-item>
        <text:list-item>
          <text:p text:style-name="P7"><text:span text:style-name="T1">Look under </text:span><text:span text:style-name="Strong_20_Emphasis"><text:span text:style-name="T2">Ports (COM &amp; LPT)</text:span></text:span><text:span text:style-name="T1">.</text:span></text:p>
        </text:list-item>
        <text:list-item>
          <text:p text:style-name="P7"><text:span text:style-name="T1">If you see </text:span><text:span text:style-name="Strong_20_Emphasis"><text:span text:style-name="T2">"Gadget Serial v2.4"</text:span></text:span><text:span text:style-name="T1"> with a yellow exclamation mark, right-click it and select </text:span><text:span text:style-name="Strong_20_Emphasis"><text:span text:style-name="T2">Update Driver</text:span></text:span><text:span text:style-name="T1">.</text:span></text:p>
        </text:list-item>
        <text:list-item>
          <text:p text:style-name="P11"><text:span text:style-name="T1">Point the update path manually to the </text:span><text:span text:style-name="Source_20_Text"><text:span text:style-name="T3">hardware\tools\x86\drivers</text:span></text:span><text:span text:style-name="T1"> folder located inside your Galileo-compatible Arduino IDE directory. [</text:span><text:a xlink:type="simple" xlink:href="https://forum.arduino.cc/t/intel-galileo-problem-com-port-unknown-on-windows-7-ent-64bit/188596" text:style-name="Internet_20_link" text:visited-style-name="Visited_20_Internet_20_Link">1</text:a><text:span text:style-name="T1">, </text:span><text:a xlink:type="simple" xlink:href="https://digitalgraphy.wordpress.com/2015/06/23/fixing-the-driver-issues-with-intel-galileo-gen-2/" text:style-name="Internet_20_link" text:visited-style-name="Visited_20_Internet_20_Link">2</text:a><text:span text:style-name="T1">, </text:span><text:a xlink:type="simple" xlink:href="https://files.amperka.ru/guides/Galileo_GettingStarted_329685_005.pdf" text:style-name="Internet_20_link" text:visited-style-name="Visited_20_Internet_20_Link">3</text:a><text:span text:style-name="T1">]</text:span></text:p>
        </text:list-item>
      </text:list>
      <text:p text:style-name="P14">4. Close Conflicting Software</text:p>
      <text:p text:style-name="P12">Only one application can use the serial port at a time.</text:p>
      <text:list xml:id="list8634863116446792755" text:style-name="L4">
        <text:list-item>
          <text:p text:style-name="P8"><text:span text:style-name="T1">Ensure you don't have the </text:span><text:span text:style-name="Strong_20_Emphasis"><text:span text:style-name="T2">Arduino Serial Monitor</text:span></text:span><text:span text:style-name="T1"> open while running the standalone Flash </text:span><text:soft-page-break/><text:span text:style-name="T1">Tool.</text:span></text:p>
        </text:list-item>
        <text:list-item>
          <text:p text:style-name="P8"><text:span text:style-name="T1">Close any background terminal software (such as PuTTY, Tera Term, or Cura) that might be scanning your COM ports. [</text:span><text:a xlink:type="simple" xlink:href="https://forum.arduino.cc/t/exception-when-using-serial-monitor/200589" text:style-name="Internet_20_link" text:visited-style-name="Visited_20_Internet_20_Link">1</text:a><text:span text:style-name="T1">, </text:span><text:a xlink:type="simple" xlink:href="https://www.reddit.com/r/esp32/comments/rk5e56/flashing_fails_90_of_the_time/" text:style-name="Internet_20_link" text:visited-style-name="Visited_20_Internet_20_Link">2</text:a><text:span text:style-name="T1">]</text:span></text:p>
        </text:list-item>
      </text:list>
      <text:p text:style-name="P13"><text:span text:style-name="T2">5. Fallback: Flash via a Blank MicroSD Card [</text:span><text:a xlink:type="simple" xlink:href="https://forum.arduino.cc/t/unprogrammable-intel-galileo/399040" text:style-name="Internet_20_link" text:visited-style-name="Visited_20_Internet_20_Link">1</text:a><text:span text:style-name="T2">]</text:span></text:p>
      <text:p text:style-name="P12">If the Java application refuses to cooperate, you can bypass the flash tool altogether:</text:p>
      <text:list xml:id="list2001310230630088482" text:style-name="L5">
        <text:list-item>
          <text:p text:style-name="P9"><text:span text:style-name="T1">Format a MicroSD card (32GB or smaller) to </text:span><text:span text:style-name="Strong_20_Emphasis"><text:span text:style-name="T2">FAT32</text:span></text:span><text:span text:style-name="T1">.</text:span></text:p>
        </text:list-item>
        <text:list-item>
          <text:p text:style-name="P10"><text:span text:style-name="T1">Download the official "Galileo Capsule" firmware binary file (</text:span><text:span text:style-name="Source_20_Text"><text:span text:style-name="T3">.cap</text:span></text:span><text:span text:style-name="T1">).</text:span></text:p>
        </text:list-item>
        <text:list-item>
          <text:p text:style-name="P10"><text:span text:style-name="T1">Rename the file to </text:span><text:span text:style-name="Strong_20_Emphasis"><text:span text:style-name="Source_20_Text"><text:span text:style-name="T4">galileo_firmware.cap</text:span></text:span></text:span><text:span text:style-name="T1"> and place it on the root of the SD card.</text:span></text:p>
        </text:list-item>
        <text:list-item>
          <text:p text:style-name="P9"><text:span text:style-name="T1">Insert the card into the powered-down Galileo, then power it on. The board will automatically update its firmware from the card over the course of a few minutes. [</text:span><text:a xlink:type="simple" xlink:href="https://shak7.github.io/content/SetupGalileo.htm" text:style-name="Internet_20_link" text:visited-style-name="Visited_20_Internet_20_Link">1</text:a><text:span text:style-name="T1">, </text:span><text:a xlink:type="simple" xlink:href="https://learn.sparkfun.com/tutorials/galileo-getting-started-guide/all" text:style-name="Internet_20_link" text:visited-style-name="Visited_20_Internet_20_Link">2</text:a><text:span text:style-name="T1">]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6-03T12:39:12.53</meta:creation-date>
    <meta:document-statistic meta:table-count="0" meta:image-count="0" meta:object-count="0" meta:page-count="2" meta:paragraph-count="28" meta:word-count="422" meta:character-count="2505"/>
    <dc:date>2026-06-03T12:40:23.80</dc:date>
    <meta:editing-duration>PT1M14S</meta:editing-duration>
    <meta:editing-cycles>1</meta:editing-cycles>
    <meta:generator>OpenOffice/4.1.14$Win32 OpenOffice.org_project/4114m1$Build-9811</meta:generator>
  </office:meta>
</office:document-meta>
</file>